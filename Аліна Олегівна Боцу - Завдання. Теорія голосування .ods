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_2116_1">
      <style:table-properties table:display="true" style:writing-mode="lr-tb"/>
    </style:style>
    <style:style style:name="ta2" style:family="table" style:master-page-name="PageStyle_5f__2116_2_20_і_20__2116_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1f1f1f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1pt" fo:font-style="normal" fo:text-shadow="none" style:text-underline-style="none" fo:font-weight="bold" style:font-size-asian="11pt" style:font-style-asian="normal" style:font-weight-asian="bold" style:font-name-complex="&quot;Google Sans&quot;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fo:text-shadow="none" style:font-style-complex="normal" fo:font-size="14pt" fo:font-weight="normal" style:text-underline-style="none" style:text-underline-color="font-color" style:text-line-through-type="none" fo:font-style="normal" style:text-outline="false" fo:color="#000000" style:text-position="0% 100%" style:font-name-complex="Times New Roman" style:font-size-asian="14pt" style:font-size-complex="14pt" style:font-weight-asian="normal" style:font-weight-complex="normal" style:font-style-asian="normal" style:font-name="Times New Roman"/>
    </style:style>
    <style:style style:name="T4" style:family="text">
      <style:text-properties fo:text-shadow="none" fo:font-size="14pt" fo:font-weight="normal" style:text-underline-style="none" style:text-underline-color="font-color" style:text-line-through-type="none" style:text-outline="false" fo:color="#000000" style:text-position="0% 100%" style:font-name-complex="Times New Roman" style:font-size-asian="14pt" style:font-size-complex="14pt" style:font-weight-asian="normal" style:font-weight-complex="normal" style:font-name="Times New Roman" fo:font-style="italic" style:font-style-asian="italic" style:font-style-complex="italic"/>
    </style:style>
    <style:style style:name="T5" style:family="text">
      <style:text-properties fo:text-shadow="none" fo:font-size="14pt" fo:font-weight="normal" style:text-underline-style="none" style:text-underline-color="font-color" style:text-line-through-type="none" style:text-outline="false" fo:color="#000000" style:text-position="0% 100%" style:font-name-complex="Times New Roman" style:font-size-asian="14pt" style:font-size-complex="14pt" style:font-weight-asian="normal" style:font-weight-complex="normal" style:font-name="Times New Roman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№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Боцу Аліна Олегівна 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Варіант 4</text:p>
          </table:table-cell>
          <table:table-cell/>
          <table:table-cell table:style-name="ce2" office:value-type="string" calcext:value-type="string">
            <text:p>і=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>
            <text:p>Профіль голосування А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Група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III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string" calcext:value-type="string">
            <text:p>VI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Кільість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1-е місце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20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2-е місце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b</text:p>
          </table:table-cell>
          <table:table-cell table:style-name="ce20"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3-е місце</text:p>
          </table:table-cell>
          <table:table-cell table:style-name="ce8" office:value-type="string" calcext:value-type="string">
            <text:p>c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20"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4-е місце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Завдання має ТРИ частини: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В першій частині для заданого профілю голосування потрібно визначити переможця за ВІСЬМОМА процедурами голосування зі своїм номером i.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Процедури: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1. Правило абсолютної більшості (студентський парламент)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2. Правило відносної більшості.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3. Правило відносної більшості з вибуттям.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4. Голосування з послідовним виключенням.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5. Правило Борда.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6. Правило Кондорсе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7. Правило Копленда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8. Правило Сімпсона</text:p>
          </table:table-cell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Для 2ї та 3-тої частин умови сформульовані по варіантам.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Для процедури голосування з підрахунком очок(балів) значення s0, s1, s2 i s3 вказати самостійно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7" office:value-type="string" calcext:value-type="string">
            <text:p>1. Правило абсолютної більшості (студентський парламент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Група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III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string" calcext:value-type="string">
            <text:p>VI</text:p>
          </table:table-cell>
          <table:table-cell/>
          <table:table-cell table:style-name="ce2" office:value-type="string" calcext:value-type="string">
            <text:p>Правило абсолютної більшості — це принцип голосування, за яким для прийняття рішення або обрання 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Кільість</text:p>
          </table:table-cell>
          <table:table-cell table:style-name="ce12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кандидата необхідно отримати понад половину голосів виборців (50% + 1 голос) від загальної кількості тих,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1-е місце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22" office:value-type="string" calcext:value-type="string">
            <text:p>a</text:p>
          </table:table-cell>
          <table:table-cell/>
          <table:table-cell table:style-name="ce2" office:value-type="string" calcext:value-type="string">
            <text:p><text:s/>хто взяв участь у голосуванні. Якщо цей поріг не досягнуто, часто проводиться другий тур.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-е місце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b</text:p>
          </table:table-cell>
          <table:table-cell table:style-name="ce20"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3-е місце</text:p>
          </table:table-cell>
          <table:table-cell table:style-name="ce8" office:value-type="string" calcext:value-type="string">
            <text:p>c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20"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4-е місце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1 тур</text:p>
          </table:table-cell>
          <table:table-cell table:style-name="ce2" office:value-type="string" calcext:value-type="string">
            <text:p>а-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Загалом 25</text:p>
          </table:table-cell>
          <table:table-cell table:style-name="ce2" office:value-type="string" calcext:value-type="string">
            <text:p>13- строга більшість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b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c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d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11&lt;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<text:span text:style-name="T1">Оскільки в 1 турі не набрано більше половини голосів, тому </text:span><text:span text:style-name="T2">переможня в данному турі немає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2. Правило відносної більшості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Група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III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string" calcext:value-type="string">
            <text:p>VI</text:p>
          </table:table-cell>
          <table:table-cell/>
          <table:table-cell table:style-name="ce2" office:value-type="string" calcext:value-type="string">
            <text:p>Кожен виборець віддає свій голос найкращому для себе кандидату –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Кільість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залишає одне ім'я в бюлетені, решту викреслює. Обирається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1-е місце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22" office:value-type="string" calcext:value-type="string">
            <text:p>a</text:p>
          </table:table-cell>
          <table:table-cell/>
          <table:table-cell table:style-name="ce2" office:value-type="string" calcext:value-type="string">
            <text:p>кандидат, який отримав найбільше голосів.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-е місце</text:p>
          </table:table-cell>
          <table:table-cell table:style-name="ce13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b</text:p>
          </table:table-cell>
          <table:table-cell table:style-name="ce20"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3-е місце</text:p>
          </table:table-cell>
          <table:table-cell table:style-name="ce8" office:value-type="string" calcext:value-type="string">
            <text:p>c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20"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4-е місце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style-name="ce17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Група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II</text:p>
          </table:table-cell>
          <table:table-cell table:style-name="ce8" office:value-type="string" calcext:value-type="string">
            <text:p>III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8" office:value-type="string" calcext:value-type="string">
            <text:p>VI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Кільість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е місце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1 тур</text:p>
          </table:table-cell>
          <table:table-cell table:style-name="ce2" office:value-type="string" calcext:value-type="string">
            <text:p>а-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Загалом 25</text:p>
          </table:table-cell>
          <table:table-cell table:style-name="ce2" office:value-type="string" calcext:value-type="string">
            <text:p>13- строга більшість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b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c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d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11&lt;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2 тур з кандидатами </text:p>
          </table:table-cell>
          <table:table-cell/>
          <table:table-cell table:style-name="ce2" office:value-type="string" calcext:value-type="string">
            <text:p>a i b </text:p>
          </table:table-cell>
          <table:table-cell table:style-name="ce2" office:value-type="string" calcext:value-type="string">
            <text:p>4+4+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15&gt;10</text:p>
          </table:table-cell>
          <table:table-cell/>
          <table:table-cell table:style-name="ce2" office:value-type="string" calcext:value-type="string">
            <text:p>Переможець: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a&gt;b</text:p>
          </table:table-cell>
          <table:table-cell/>
          <table:table-cell table:style-name="ce2" office:value-type="string" calcext:value-type="string">
            <text:p>а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Порівняємо переможця а з іншими кандидатами, що не пройшли в 2 тур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а i c</text:p>
          </table:table-cell>
          <table:table-cell/>
          <table:table-cell table:style-name="ce2" office:value-type="string" calcext:value-type="string">
            <text:p>а i 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15&gt;10</text:p>
          </table:table-cell>
          <table:table-cell/>
          <table:table-cell table:style-name="ce2" office:value-type="string" calcext:value-type="string">
            <text:p>15&gt;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Робимо висновок, що переможцем стає "а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3. Правило відносної більшості з вибуттям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Група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III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string" calcext:value-type="string">
            <text:p>VI</text:p>
          </table:table-cell>
          <table:table-cell/>
          <table:table-cell table:style-name="ce2" office:value-type="string" calcext:value-type="string">
            <text:p>У першому турі кожен виборець віддає свій голос найкращому кандидату за власною думкою (залишає одне ім'я в бюлетені).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Кільість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Якщо кандидат набирає строгу більшість голосів, він обирається.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1-е місце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22" office:value-type="string" calcext:value-type="string">
            <text:p>a</text:p>
          </table:table-cell>
          <table:table-cell/>
          <table:table-cell table:style-name="ce2" office:value-type="string" calcext:value-type="string">
            <text:p>Інакше у другому турі проводиться голосування за правилом більшості з двома кандидатами, які набрали найбільшу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-е місце</text:p>
          </table:table-cell>
          <table:table-cell table:style-name="ce13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b</text:p>
          </table:table-cell>
          <table:table-cell table:style-name="ce20" office:value-type="string" calcext:value-type="string">
            <text:p>d</text:p>
          </table:table-cell>
          <table:table-cell/>
          <table:table-cell table:style-name="ce2" office:value-type="string" calcext:value-type="string">
            <text:p>кількість голосів у першому турі.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3-е місце</text:p>
          </table:table-cell>
          <table:table-cell table:style-name="ce8" office:value-type="string" calcext:value-type="string">
            <text:p>c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20"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4-е місце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style-name="ce17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1 тур</text:p>
          </table:table-cell>
          <table:table-cell table:style-name="ce2" office:value-type="string" calcext:value-type="string">
            <text:p>а-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Загалом 25</text:p>
          </table:table-cell>
          <table:table-cell table:style-name="ce2" office:value-type="string" calcext:value-type="string">
            <text:p>13- строга більшість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b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c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Оскільки тут найменша кількість голосів, тому він відраховується від голосуванн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d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Оскільки тут найменша кількість голосів, тому він відраховується від голосування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11&lt;13 -- не строга більшість </text:p>
          </table:table-cell>
          <table:table-cell table:number-columns-repeated="1021"/>
        </table:table-row>
        <table:table-row table:style-name="ro2">
          <table:table-cell table:number-columns-repeated="5"/>
          <table:table-cell table:style-name="ce2" office:value-type="string" calcext:value-type="string">
            <text:p>АБО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2 тур</text:p>
          </table:table-cell>
          <table:table-cell table:style-name="ce2" office:value-type="string" calcext:value-type="string">
            <text:p>а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  <table:table-cell table:style-name="ce2" office:value-type="string" calcext:value-type="string">
            <text:p>2 тур</text:p>
          </table:table-cell>
          <table:table-cell table:style-name="ce2" office:value-type="string" calcext:value-type="string">
            <text:p>а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>
            <text:p>b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" office:value-type="string" calcext:value-type="string">
            <text:p>b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2" office:value-type="string" calcext:value-type="string">
            <text:p>c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>
            <text:p>a i b </text:p>
          </table:table-cell>
          <table:table-cell table:style-name="ce2" office:value-type="string" calcext:value-type="string">
            <text:p>4+4+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15&gt;10</text:p>
          </table:table-cell>
          <table:table-cell/>
          <table:table-cell table:style-name="ce2" office:value-type="string" calcext:value-type="string">
            <text:p>Переможець:</text:p>
          </table:table-cell>
          <table:table-cell/>
          <table:table-cell table:style-name="ce2" office:value-type="string" calcext:value-type="string">
            <text:p>Так як в группі 5 на 1 місці був d а потім b, тоді голоса за кандидата d будуть віддаватися кандидату b, і тоді: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a&gt;b</text:p>
          </table:table-cell>
          <table:table-cell/>
          <table:table-cell table:style-name="ce2" office:value-type="string" calcext:value-type="string">
            <text:p>а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2" office:value-type="string" calcext:value-type="string">
            <text:p>2 тур</text:p>
          </table:table-cell>
          <table:table-cell table:style-name="ce2" office:value-type="string" calcext:value-type="string">
            <text:p>а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2" office:value-type="string" calcext:value-type="string">
            <text:p>b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7+3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2" office:value-type="string" calcext:value-type="string">
            <text:p>c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Оскільки тут найменша кількість голосів, тому він відраховується від голосування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2" office:value-type="string" calcext:value-type="string">
            <text:p>3 тур</text:p>
          </table:table-cell>
          <table:table-cell table:style-name="ce2" office:value-type="string" calcext:value-type="string">
            <text:p>а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2" office:value-type="string" calcext:value-type="string">
            <text:p>b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2" office:value-type="string" calcext:value-type="string">
            <text:p>Аналогічно виконуємо дію і отримаємо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" office:value-type="string" calcext:value-type="string">
            <text:p>а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1+4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2" office:value-type="string" calcext:value-type="string">
            <text:p>b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calcext:value-type="string">
            <text:p>15&gt;1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<text:span text:style-name="T1">Тому, </text:span><text:span text:style-name="T2">переможцем стає "а"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4. Голосування з послідовним виключенням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Група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III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string" calcext:value-type="string">
            <text:p>VI</text:p>
          </table:table-cell>
          <table:table-cell/>
          <table:table-cell table:style-name="ce2" office:value-type="string" calcext:value-type="string">
            <text:p>Спочатку встановлюється порядок порівняння кандидатів,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Кільість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далі за правилом більшості кандидати послідовно порівнюються попарно.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1-е місце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2" office:value-type="string" calcext:value-type="string">
            <text:p>Якщо кандидатів m, то маємо m-1 турів головування.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-е місце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15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d</text:p>
          </table:table-cell>
          <table:table-cell/>
          <table:table-cell table:style-name="ce2" office:value-type="string" calcext:value-type="string">
            <text:p>В першому турі порівнюються два перших кандидата з ланцюгу порівняння, переможець першого туру в другому турі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3-е місце</text:p>
          </table:table-cell>
          <table:table-cell table:style-name="ce8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22" office:value-type="string" calcext:value-type="string">
            <text:p>c</text:p>
          </table:table-cell>
          <table:table-cell/>
          <table:table-cell table:style-name="ce2" office:value-type="string" calcext:value-type="string">
            <text:p>порівнюється з третім кандидатом в ланцюгу і т.д.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4-е місце</text:p>
          </table:table-cell>
          <table:table-cell table:style-name="ce11" office:value-type="string" calcext:value-type="string">
            <text:p>d</text:p>
          </table:table-cell>
          <table:table-cell table:style-name="ce16" office:value-type="string" calcext:value-type="string">
            <text:p>a</text:p>
          </table:table-cell>
          <table:table-cell table:style-name="ce17" office:value-type="string" calcext:value-type="string">
            <text:p>c</text:p>
          </table:table-cell>
          <table:table-cell table:style-name="ce18" office:value-type="string" calcext:value-type="string">
            <text:p>b</text:p>
          </table:table-cell>
          <table:table-cell table:style-name="ce16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2" office:value-type="string" calcext:value-type="string">
            <text:p>Переможець (m-1)-го туру є переможцем за даною процедурою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Встановлюємо порядок </text:p>
          </table:table-cell>
          <table:table-cell table:number-columns-repeated="7"/>
          <table:table-cell table:style-name="ce2" office:value-type="string" calcext:value-type="string">
            <text:p>Це правило має ще одну назву: “олімпійська система”.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d-c-b-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1 тур</text:p>
          </table:table-cell>
          <table:table-cell table:style-name="ce2" office:value-type="string" calcext:value-type="string">
            <text:p>d i c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14&gt;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Переможець: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2 тур</text:p>
          </table:table-cell>
          <table:table-cell table:style-name="ce2" office:value-type="string" calcext:value-type="string">
            <text:p>d i b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14&gt;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Переможець: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3 тур</text:p>
          </table:table-cell>
          <table:table-cell table:style-name="ce2" office:value-type="string" calcext:value-type="string">
            <text:p>d i 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10&lt;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Переможець: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Робимо висновок, що переможець "а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5. Правило Борда.</text:p>
          </table:table-cell>
          <table:table-cell table:number-columns-repeated="1022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Група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III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string" calcext:value-type="string">
            <text:p>VI</text:p>
          </table:table-cell>
          <table:table-cell/>
          <table:table-cell table:style-name="ce2" office:value-type="string" calcext:value-type="string">
            <text:p>Кожен виборець оголошує свої переваги, впорядковуючи m кандидатів від кращого до гіршого (байдужість забороняється).</text:p>
          </table:table-cell>
          <table:table-cell table:number-columns-repeated="7"/>
          <table:table-cell table:style-name="ce2" office:value-type="string" calcext:value-type="string">
            <text:p>Вже маємо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string" calcext:value-type="string">
            <text:p>Кільість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Кандидат не отримує балів за останнє місце, отримує 1 бал від кожного виборця за передостаннє тощо,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1-е місце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2" office:value-type="string" calcext:value-type="string">
            <text:p>отримує m-1 балів за перше місце. Перемагає кандидат із найбільшою сумою балів.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-е місце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b</text:p>
          </table:table-cell>
          <table:table-cell table:style-name="ce20"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3-е місце</text:p>
          </table:table-cell>
          <table:table-cell table:style-name="ce8" office:value-type="string" calcext:value-type="string">
            <text:p>c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20"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4-е місце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Бали </text:p>
          </table:table-cell>
          <table:table-cell table:number-columns-repeated="6"/>
          <table:table-cell table:style-name="ce2" office:value-type="string" calcext:value-type="string">
            <text:p>Сумма балів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а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7" table:formula="of:=SUM([.C154:.H154])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b-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formula="of:=SUM([.C155:.H155])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c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7" table:formula="of:=SUM([.C156:.H156])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d-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7" table:formula="of:=SUM([.C157:.H15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Перемагає кандидат "b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6. Правило Кондорсе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Перевіримо такі пари</text:p>
          </table:table-cell>
          <table:table-cell/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Переможець:</text:p>
          </table:table-cell>
          <table:table-cell/>
          <table:table-cell table:style-name="ce2" office:value-type="string" calcext:value-type="string">
            <text:p>Процедура Кондорсе. Для заданої таблиці результатів голосування (таблиці переваг) переможцем за Кондорсе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 calcext:value-type="string">
            <text:p>a i 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2" office:value-type="string" calcext:value-type="string">
            <text:p>називається кандидат, що перемагає будь-якого іншого кандидата при парному порівнянні за правилом більшості.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 calcext:value-type="string">
            <text:p>a i 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a i d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b i c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b i 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c i 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Маємо</text:p>
          </table:table-cell>
          <table:table-cell table:style-name="ce2" office:value-type="string" calcext:value-type="string">
            <text:p>a&gt;b, a&gt;c, a&gt;d, b&gt;c, d&gt;b, d&gt;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a&gt;b, b&gt;c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a&gt;c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<text:s/>a&gt;d, d&gt;b, d&gt;c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<text:s/>a&gt;d, d&gt;b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<text:s/>a&gt;d, d&gt;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Робимо висновок, що переможець "а", оскільки a&gt;b, a&gt;c, a&gt;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7. Правило Копленда</text:p>
          </table:table-cell>
          <table:table-cell table:number-columns-repeated="7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Нарахуємо бали за перемогу 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2" office:value-type="string" calcext:value-type="string">
            <text:p>Програвші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Сумуваня балів 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Переможці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6" table:formula="of:=SUM([.D186:.G186])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7" table:formula="of:=SUM([.D187:.G18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7" table:formula="of:=SUM([.D188:.G18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 calcext:value-type="string">
            <text:p>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7" table:formula="of:=SUM([.D189:.G189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Робимо висновок, що переможець "а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8. Правило Сімпсона</text:p>
          </table:table-cell>
          <table:table-cell table:number-columns-repeated="5"/>
          <table:table-cell table:style-name="ce2" office:value-type="string" calcext:value-type="string">
            <text:p>Правило Сімпсона (або метод мінімаксу) — це метод визначення переможця у теорії голосувань, який обирає кандидата,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" office:value-type="string" calcext:value-type="string">
            <text:p><text:s/>що зазнав найменшої максимальної поразки в парних порівняннях.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Перевіримо такі пари</text:p>
          </table:table-cell>
          <table:table-cell/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Переможець:</text:p>
          </table:table-cell>
          <table:table-cell/>
          <table:table-cell table:style-name="ce2" office:value-type="string" calcext:value-type="string">
            <text:p><text:s/>Він спрямований на зменшення впливу сильних опонентів, обираючи того, хто краще за інших витримує конкуренцію.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 calcext:value-type="string">
            <text:p>a i 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a i 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a i d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b i c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b i 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c i 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"j" в порівнянні з "i" <text:s/>віддали ** голосів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14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14" office:value-type="float" office:value="15" calcext:value-type="float">
            <text:p>1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Потрібен мінімум по стовпчиках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Тому 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Переможців b, c, d <text:s/>можна вважати рівноцінними переможцями </text:p>
          </table:table-cell>
          <table:table-cell table:number-columns-repeated="1022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№2 і №3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style-name="ce9" office:value-type="string" calcext:value-type="string">
            <text:p>№2</text:p>
          </table:table-cell>
          <table:table-cell table:style-name="ce28" office:value-type="string" calcext:value-type="string">
            <text:p>Критерій більшості полягає в наступному: </text:p>
          </table:table-cell>
          <table:table-cell table:number-columns-repeated="1022"/>
        </table:table-row>
        <table:table-row table:style-name="ro2">
          <table:table-cell/>
          <table:table-cell table:style-name="ce28" office:value-type="string" calcext:value-type="string">
            <text:p><text:span text:style-name="T3">якщо альтернативу </text:span><text:span text:style-name="T4">x</text:span><text:span text:style-name="T5"> на 1-е місце поставило більше 50% виборців, то вона повинна стати переможцем і за процедурою голосування. </text:span></text:p>
          </table:table-cell>
          <table:table-cell table:number-columns-repeated="1022"/>
        </table:table-row>
        <table:table-row table:style-name="ro2">
          <table:table-cell/>
          <table:table-cell table:style-name="ce28" office:value-type="string" calcext:value-type="string">
            <text:p>Критерій Кондорсе звучить так: якщо в заданих умовах існує переможець за Кондорсе, то процедура голосування повинна обрати переможцем саме його.</text:p>
          </table:table-cell>
          <table:table-cell table:number-columns-repeated="1022"/>
        </table:table-row>
        <table:table-row table:style-name="ro2">
          <table:table-cell/>
          <table:table-cell table:style-name="ce28" office:value-type="string" calcext:value-type="string">
            <text:p><text:s/>А тепер поясніть (доведіть), чому будь-який метод голосування, який порушує критерій більшості, порушує також і критерій Кондорсе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Розв'язання: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Розглянемо у чому полягає процедура Кондорсе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" office:value-type="string" calcext:value-type="string">
            <text:p>Процедура Кондорсе. Для заданої таблиці результатів</text:p>
          </table:table-cell>
          <table:table-cell table:number-columns-repeated="10"/>
          <table:table-cell table:style-name="ce2" office:value-type="string" calcext:value-type="string">
            <text:p>На прикладі </text:p>
          </table:table-cell>
          <table:table-cell table:style-name="ce7" office:value-type="string" calcext:value-type="string">
            <text:p>6. Правило Кондорсе</text:p>
          </table:table-cell>
          <table:table-cell table:number-columns-repeated="5"/>
          <table:table-cell table:style-name="ce4" office:value-type="string" calcext:value-type="string">
            <text:p>Група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III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style-name="ce2" office:value-type="string" calcext:value-type="string">
            <text:p>голосування (таблиці переваг) переможцем за Кондорсе</text:p>
          </table:table-cell>
          <table:table-cell table:number-columns-repeated="17"/>
          <table:table-cell table:style-name="ce4" office:value-type="string" calcext:value-type="string">
            <text:p>Кільість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style-name="ce2" office:value-type="string" calcext:value-type="string">
            <text:p>називається кандидат, що перемагає будь-якого іншого</text:p>
          </table:table-cell>
          <table:table-cell table:number-columns-repeated="11"/>
          <table:table-cell table:style-name="ce2" office:value-type="string" calcext:value-type="string">
            <text:p>Перевіримо такі пари</text:p>
          </table:table-cell>
          <table:table-cell/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Переможець:</text:p>
          </table:table-cell>
          <table:table-cell/>
          <table:table-cell table:style-name="ce4" office:value-type="string" calcext:value-type="string">
            <text:p>1-е місце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1">кандидата при парному порівнянні</text:span><text:span text:style-name="T2"> за правилом більшості.</text:span></text:p>
          </table:table-cell>
          <table:table-cell table:number-columns-repeated="12"/>
          <table:table-cell table:style-name="ce2" office:value-type="string" calcext:value-type="string">
            <text:p>a i 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4" office:value-type="string" calcext:value-type="string">
            <text:p>2-е місце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b</text:p>
          </table:table-cell>
          <table:table-cell table:number-columns-repeated="998"/>
        </table:table-row>
        <table:table-row table:style-name="ro2">
          <table:table-cell table:number-columns-repeated="15"/>
          <table:table-cell table:style-name="ce2" office:value-type="string" calcext:value-type="string">
            <text:p>a i 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4" office:value-type="string" calcext:value-type="string">
            <text:p>3-е місце</text:p>
          </table:table-cell>
          <table:table-cell table:style-name="ce8" office:value-type="string" calcext:value-type="string">
            <text:p>c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string" calcext:value-type="string">
            <text:p>Так як ми маємо вислів </text:p>
          </table:table-cell>
          <table:table-cell table:number-columns-repeated="13"/>
          <table:table-cell table:style-name="ce2" office:value-type="string" calcext:value-type="string">
            <text:p>a i d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4" office:value-type="string" calcext:value-type="string">
            <text:p>4-е місце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style-name="ce28" office:value-type="string" calcext:value-type="string">
            <text:p><text:span text:style-name="T3">якщо альтернативу </text:span><text:span text:style-name="T4">x</text:span><text:span text:style-name="T5"> на 1-е місце поставило більше 50% виборців, то вона повинна стати переможцем і за процедурою голосування. </text:span></text:p>
          </table:table-cell>
          <table:table-cell table:number-columns-repeated="12"/>
          <table:table-cell table:style-name="ce2" office:value-type="string" calcext:value-type="string">
            <text:p>b i c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2" office:value-type="string" calcext:value-type="string">
            <text:p>то він підпорядковується крітерію абсолютної більшості</text:p>
          </table:table-cell>
          <table:table-cell table:number-columns-repeated="13"/>
          <table:table-cell table:style-name="ce2" office:value-type="string" calcext:value-type="string">
            <text:p>b i 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2" office:value-type="string" calcext:value-type="string">
            <text:p>c i 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2" office:value-type="string" calcext:value-type="string">
            <text:p>Тобто Х набрав більше 50% голосів, що робить Х абсолютним переможцем, а інших кандидатів, не маючи залежності від їх кількості, стають абсолютними програвшими.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" office:value-type="string" calcext:value-type="string">
            <text:p>Х&gt;a0</text:p>
          </table:table-cell>
          <table:table-cell table:number-columns-repeated="11"/>
          <table:table-cell table:style-name="ce2" office:value-type="string" calcext:value-type="string">
            <text:p>Маємо</text:p>
          </table:table-cell>
          <table:table-cell table:style-name="ce2" office:value-type="string" calcext:value-type="string">
            <text:p>a&gt;b, a&gt;c, a&gt;d, b&gt;c, d&gt;b, d&gt;c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" office:value-type="string" calcext:value-type="string">
            <text:p>X&gt;a1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...</text:p>
          </table:table-cell>
          <table:table-cell table:number-columns-repeated="12"/>
          <table:table-cell table:style-name="ce2" office:value-type="string" calcext:value-type="string">
            <text:p>a&gt;b, b&gt;c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" office:value-type="string" calcext:value-type="string">
            <text:p>X&gt;an</text:p>
          </table:table-cell>
          <table:table-cell table:number-columns-repeated="12"/>
          <table:table-cell table:style-name="ce2" office:value-type="string" calcext:value-type="string">
            <text:p>a&gt;c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Якщо ця умова не виконується, то ми не можемо обрати переможця за крітерієм більшості. <text:s/>Відповідно не можемо обрати переможця за крітерієм Кондорсе, оскільки умова є необхідною</text:p>
          </table:table-cell>
          <table:table-cell table:number-columns-repeated="13"/>
          <table:table-cell table:style-name="ce2" office:value-type="string" calcext:value-type="string">
            <text:p><text:s/>a&gt;d, d&gt;b, d&gt;c</text:p>
          </table:table-cell>
          <table:table-cell table:number-columns-repeated="1008"/>
        </table:table-row>
        <table:table-row table:style-name="ro2">
          <table:table-cell table:number-columns-repeated="15"/>
          <table:table-cell table:style-name="ce2" office:value-type="string" calcext:value-type="string">
            <text:p><text:s/>a&gt;d, d&gt;b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Будь-який метод голосування, який порушує критерій більшості, порушує також і критерій Кондорсе </text:p>
          </table:table-cell>
          <table:table-cell table:number-columns-repeated="13"/>
          <table:table-cell table:style-name="ce2" office:value-type="string" calcext:value-type="string">
            <text:p><text:s/>a&gt;d, d&gt;c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" office:value-type="string" calcext:value-type="string">
            <text:p>тому що це є необхідною умовою для того, щоб виконувався кр. Кондорсе, оскільки елементарно ми не зможемо порівняти які з наших пари кандидатів набрали найбільше голосів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тобто неможливо визначитись з кількістю пар кандидатів</text:p>
          </table:table-cell>
          <table:table-cell table:number-columns-repeated="11"/>
          <table:table-cell table:style-name="ce9" office:value-type="string" calcext:value-type="string">
            <text:p>Робимо висновок, що переможець "а", оскільки a&gt;b, a&gt;c, a&gt;d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№3</text:p>
          </table:table-cell>
          <table:table-cell table:style-name="ce28" office:value-type="string" calcext:value-type="string">
            <text:p>Доведіть, що якщо в голосуванні з непарною кількістю виборців не буде переможця за Кондорсе, </text:p>
          </table:table-cell>
          <table:table-cell table:number-columns-repeated="1022"/>
        </table:table-row>
        <table:table-row table:style-name="ro2">
          <table:table-cell/>
          <table:table-cell table:style-name="ce28" office:value-type="string" calcext:value-type="string">
            <text:p>то в будь-якому рейтингу кандидатів, побудованому на основі попарного порівняння, як мінімум 2 кандидати займуть одне й те саме місц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Доведення: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Наведемо приклад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Маємо кандидатів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Якщо кількість кандидатів непарна, тоді в будь якому випадку в нас повинен бути переможець 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Нехай буде складатися така ситуація 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</text:p>
          </table:table-cell>
          <table:table-cell/>
          <table:table-cell table:style-name="ce2" office:value-type="string" calcext:value-type="string">
            <text:p>a&gt;b&gt;c&gt;d&gt;e&gt;a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e</text:p>
          </table:table-cell>
          <table:table-cell/>
          <table:table-cell table:style-name="ce2" office:value-type="string" calcext:value-type="string">
            <text:p>Тоді буде складатися така суперечність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" office:value-type="string" calcext:value-type="string">
            <text:p>a&gt;e&gt;a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" office:value-type="string" calcext:value-type="string">
            <text:p>Ця нерівність неможлива, оскільки відповідь буде пуста множина 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Перевіримо такі пари</text:p>
          </table:table-cell>
          <table:table-cell/>
          <table:table-cell table:style-name="ce2" office:value-type="string" calcext:value-type="string">
            <text:p>a i b</text:p>
          </table:table-cell>
          <table:table-cell/>
          <table:table-cell table:style-name="ce2" office:value-type="string" calcext:value-type="string">
            <text:p>"а" знаходиться в рейтингу вище за "е", і одночасно "е" також повинно бути вище за "а"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a i c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" office:value-type="string" calcext:value-type="string">
            <text:p>a i d</text:p>
          </table:table-cell>
          <table:table-cell/>
          <table:table-cell table:style-name="ce2" office:value-type="string" calcext:value-type="string">
            <text:p>Отже, побудувати строгий рейтинг у якому всі кандидати займають різні місця неможливо без суперечностей.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a i 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" office:value-type="string" calcext:value-type="string">
            <text:p>b i c</text:p>
          </table:table-cell>
          <table:table-cell/>
          <table:table-cell table:style-name="ce2" office:value-type="string" calcext:value-type="string">
            <text:p>Якщо виникає така ситуація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b i d</text:p>
          </table:table-cell>
          <table:table-cell/>
          <table:table-cell table:style-name="ce2" office:value-type="string" calcext:value-type="string">
            <text:p>a=b&gt;c&gt;d&gt;e&gt;a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b i e</text:p>
          </table:table-cell>
          <table:table-cell/>
          <table:table-cell table:style-name="ce2" office:value-type="string" calcext:value-type="string">
            <text:p>Тобто деякі з кандидатів рівні, тоді не виникає суперечності.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c i d</text:p>
          </table:table-cell>
          <table:table-cell/>
          <table:table-cell table:style-name="ce2" office:value-type="string" calcext:value-type="string">
            <text:p>Всі кандидати мають своє окреме місце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c i e</text:p>
          </table:table-cell>
          <table:table-cell/>
          <table:table-cell table:style-name="ce2" office:value-type="string" calcext:value-type="string">
            <text:p>Єдиний спосіб уникнути суперечності це дозволити, щоб деякі кандидати мали однакові місця.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 i e</text:p>
          </table:table-cell>
          <table:table-cell table:number-columns-repeated="1020"/>
        </table:table-row>
        <table:table-row table:style-name="ro2">
          <table:table-cell table:number-columns-repeated="5"/>
          <table:table-cell table:style-name="ce2" office:value-type="string" calcext:value-type="string">
            <text:p>Можемо зробити висновок, що якщо немає переможця за Кондорсе, то в будь-якому рейтингу, 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" office:value-type="string" calcext:value-type="string">
            <text:p>побудованому на основі попарних порівнянь, прийняті два кандидати повинні займати одне й те саме місце.</text:p>
          </table:table-cell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116_1" style:display-name="PageStyle_№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116_2_20_і_20__2116_3" style:display-name="PageStyle_№2 і №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30" meta:object-count="0"/>
    <meta:generator>LibreOfficeDev/6.0.5.2$Linux_X86_64 LibreOffice_project/</meta:generator>
  </office:meta>
</office:document-meta>
</file>